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नाम</text:p>
          </table:table-cell>
          <table:table-cell office:value-type="string">
            <text:p>पति का नाम</text:p>
          </table:table-cell>
          <table:table-cell office:value-type="string">
            <text:p>आयु</text:p>
          </table:table-cell>
        </table:table-row>
        <table:table-row table:style-name="ro1">
          <table:table-cell office:value-type="string">
            <text:p>सत्यादा</text:p>
          </table:table-cell>
          <table:table-cell office:value-type="string">
            <text:p>शेर सिंह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मिश्री</text:p>
          </table:table-cell>
          <table:table-cell office:value-type="string">
            <text:p>बनवारी लाल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शांति</text:p>
          </table:table-cell>
          <table:table-cell office:value-type="string">
            <text:p>सतपाल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फूला देवी</text:p>
          </table:table-cell>
          <table:table-cell office:value-type="string">
            <text:p>सोहन लाल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शांति</text:p>
          </table:table-cell>
          <table:table-cell office:value-type="string">
            <text:p>मक्खन सिंह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जय देवी</text:p>
          </table:table-cell>
          <table:table-cell office:value-type="string">
            <text:p>शो लाल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लक्ष्मी</text:p>
          </table:table-cell>
          <table:table-cell office:value-type="string">
            <text:p>शौताज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मेवा देवी</text:p>
          </table:table-cell>
          <table:table-cell office:value-type="string">
            <text:p>राम प्रताप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भर पाई</text:p>
          </table:table-cell>
          <table:table-cell office:value-type="string">
            <text:p>शेर सिंह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मेवा</text:p>
          </table:table-cell>
          <table:table-cell office:value-type="string">
            <text:p>भूप सिंह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श्रवण देवी</text:p>
          </table:table-cell>
          <table:table-cell office:value-type="string">
            <text:p>भवानी सिंह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किरण</text:p>
          </table:table-cell>
          <table:table-cell office:value-type="string">
            <text:p>लच्छी राम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सारती देवी</text:p>
          </table:table-cell>
          <table:table-cell office:value-type="string">
            <text:p>श्री राम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नारायणी</text:p>
          </table:table-cell>
          <table:table-cell office:value-type="string">
            <text:p>राम कुमार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मनभावती</text:p>
          </table:table-cell>
          <table:table-cell office:value-type="string">
            <text:p>सूरज भान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कमला देवी</text:p>
          </table:table-cell>
          <table:table-cell office:value-type="string">
            <text:p>निहाल सिंह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तारा वती</text:p>
          </table:table-cell>
          <table:table-cell office:value-type="string">
            <text:p>प्रभु सिंह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बीर मती</text:p>
          </table:table-cell>
          <table:table-cell office:value-type="string">
            <text:p>ओम प्रकाश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विद्या देवी</text:p>
          </table:table-cell>
          <table:table-cell office:value-type="string">
            <text:p>भूप सिंह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नर्मदा देवी</text:p>
          </table:table-cell>
          <table:table-cell office:value-type="string">
            <text:p>कर्तार सिंह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शकुंतला</text:p>
          </table:table-cell>
          <table:table-cell office:value-type="string">
            <text:p>शुभ राम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मिश्री</text:p>
          </table:table-cell>
          <table:table-cell office:value-type="string">
            <text:p>फूल सिंह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बिरमती</text:p>
          </table:table-cell>
          <table:table-cell office:value-type="string">
            <text:p>किशन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अंगूरी</text:p>
          </table:table-cell>
          <table:table-cell office:value-type="string">
            <text:p>तेज राम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संत्रा</text:p>
          </table:table-cell>
          <table:table-cell office:value-type="string">
            <text:p>हरी राम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भगवती</text:p>
          </table:table-cell>
          <table:table-cell office:value-type="string">
            <text:p>धर्मवीर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सुशील</text:p>
          </table:table-cell>
          <table:table-cell office:value-type="string">
            <text:p>दलीप सिंह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सावित्री</text:p>
          </table:table-cell>
          <table:table-cell office:value-type="string">
            <text:p>लक्ष्मण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विद्या देवी</text:p>
          </table:table-cell>
          <table:table-cell office:value-type="string">
            <text:p>तेज राम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चंदर कला</text:p>
          </table:table-cell>
          <table:table-cell office:value-type="string">
            <text:p>मांगे राम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सावित्री</text:p>
          </table:table-cell>
          <table:table-cell office:value-type="string">
            <text:p>कर्तार सिंह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कमला</text:p>
          </table:table-cell>
          <table:table-cell office:value-type="string">
            <text:p>रोहताश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चंद्रा कला</text:p>
          </table:table-cell>
          <table:table-cell office:value-type="string">
            <text:p>प्रह्लाद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संत्रा</text:p>
          </table:table-cell>
          <table:table-cell office:value-type="string">
            <text:p>सुरेंद्र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राम गिरी</text:p>
          </table:table-cell>
          <table:table-cell office:value-type="string">
            <text:p>शो करण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बिरमा देवी</text:p>
          </table:table-cell>
          <table:table-cell office:value-type="string">
            <text:p>महेंद्र सिंह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बसंती देवी</text:p>
          </table:table-cell>
          <table:table-cell office:value-type="string">
            <text:p>सुरेंद्र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संत्रा</text:p>
          </table:table-cell>
          <table:table-cell office:value-type="string">
            <text:p>दलीप सिंह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चंद्रवाल</text:p>
          </table:table-cell>
          <table:table-cell office:value-type="string">
            <text:p>उदामी राम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शकुंतला देवी</text:p>
          </table:table-cell>
          <table:table-cell office:value-type="string">
            <text:p>दयानंद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राजबाला</text:p>
          </table:table-cell>
          <table:table-cell office:value-type="string">
            <text:p>शत्रुघ्न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कौशल्या देवी</text:p>
          </table:table-cell>
          <table:table-cell office:value-type="string">
            <text:p>विजेंद्र सिंह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पवित्रा</text:p>
          </table:table-cell>
          <table:table-cell office:value-type="string">
            <text:p>राजेंद्र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भगोटी देवी</text:p>
          </table:table-cell>
          <table:table-cell office:value-type="string">
            <text:p>दलीप सिंह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फूल कौर</text:p>
          </table:table-cell>
          <table:table-cell office:value-type="string">
            <text:p>विद्या रतन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राजबाला</text:p>
          </table:table-cell>
          <table:table-cell office:value-type="string">
            <text:p>राम कुमार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शकुंतला</text:p>
          </table:table-cell>
          <table:table-cell office:value-type="string">
            <text:p>गोकल सिंह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निम्बो देवी</text:p>
          </table:table-cell>
          <table:table-cell office:value-type="string">
            <text:p>माम चं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रुकमणी</text:p>
          </table:table-cell>
          <table:table-cell office:value-type="string">
            <text:p>सूरज भान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चलती देवी</text:p>
          </table:table-cell>
          <table:table-cell office:value-type="string">
            <text:p>उमराव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सावित्री</text:p>
          </table:table-cell>
          <table:table-cell office:value-type="string">
            <text:p>रमेश्वर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संतोष</text:p>
          </table:table-cell>
          <table:table-cell office:value-type="string">
            <text:p>राम कुमार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कमला</text:p>
          </table:table-cell>
          <table:table-cell office:value-type="string">
            <text:p>हरचंद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गुमान देवी</text:p>
          </table:table-cell>
          <table:table-cell office:value-type="string">
            <text:p>मकतूल सिंह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अंतर देवी</text:p>
          </table:table-cell>
          <table:table-cell office:value-type="string">
            <text:p>रिसाल सिंह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चंपा देवी</text:p>
          </table:table-cell>
          <table:table-cell office:value-type="string">
            <text:p>धर्मपाल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आनंदी</text:p>
          </table:table-cell>
          <table:table-cell office:value-type="string">
            <text:p>जगदीश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रुकमणी</text:p>
          </table:table-cell>
          <table:table-cell office:value-type="string">
            <text:p>गिरधारी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रूपवती</text:p>
          </table:table-cell>
          <table:table-cell office:value-type="string">
            <text:p>रघुनाथ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सावित्री देवी</text:p>
          </table:table-cell>
          <table:table-cell office:value-type="string">
            <text:p>राम किशोर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कमला देवी</text:p>
          </table:table-cell>
          <table:table-cell office:value-type="string">
            <text:p>नित्यनंद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कपूरी देवी</text:p>
          </table:table-cell>
          <table:table-cell office:value-type="string">
            <text:p>प्रकाश चंद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राम कला</text:p>
          </table:table-cell>
          <table:table-cell office:value-type="string">
            <text:p>रमेश्वर दयाल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संतोष</text:p>
          </table:table-cell>
          <table:table-cell office:value-type="string">
            <text:p>शिवलाल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संतोष देवी</text:p>
          </table:table-cell>
          <table:table-cell office:value-type="string">
            <text:p>इंदर पाल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सुरजी</text:p>
          </table:table-cell>
          <table:table-cell office:value-type="string">
            <text:p>सत्यवा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उगम देवी</text:p>
          </table:table-cell>
          <table:table-cell office:value-type="string">
            <text:p>राम चंद्र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शारदा</text:p>
          </table:table-cell>
          <table:table-cell office:value-type="string">
            <text:p>सतदेव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राजबाई</text:p>
          </table:table-cell>
          <table:table-cell office:value-type="string">
            <text:p>रामौतार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सारे देवी</text:p>
          </table:table-cell>
          <table:table-cell office:value-type="string">
            <text:p>रोहताश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सावित्री देवी</text:p>
          </table:table-cell>
          <table:table-cell office:value-type="string">
            <text:p>शमशेर सिंह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संता देवी</text:p>
          </table:table-cell>
          <table:table-cell office:value-type="string">
            <text:p>बीरजू सिंह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विद्या देवी</text:p>
          </table:table-cell>
          <table:table-cell office:value-type="string">
            <text:p>शेर सिंह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शराबती</text:p>
          </table:table-cell>
          <table:table-cell office:value-type="string">
            <text:p>राम निवास</text:p>
          </table:table-cell>
          <table:table-cell office:value-type="float" office:value="70">
            <text:p>7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6">10/06/2025</text:date>, <text:time>23:4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6T23:42:50.87</meta:creation-date>
    <dc:date>2025-10-06T23:43:42.97</dc:date>
    <meta:editing-duration>PT56S</meta:editing-duration>
    <meta:editing-cycles>1</meta:editing-cycles>
    <meta:document-statistic meta:table-count="3" meta:cell-count="225" meta:object-count="0"/>
    <meta:generator>OpenOffice/4.1.13$Win32 OpenOffice.org_project/4113m1$Build-9810</meta:generator>
  </office:meta>
</office:document-meta>
</file>